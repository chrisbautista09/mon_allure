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, ui-serif, 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1cm" fo:margin-left="0cm" table:align="left"/>
    </style:style>
    <style:style style:name="Tableau1.A" style:family="table-column">
      <style:table-column-properties style:column-width="3.2cm"/>
    </style:style>
    <style:style style:name="Tableau1.B" style:family="table-column">
      <style:table-column-properties style:column-width="2cm"/>
    </style:style>
    <style:style style:name="Tableau1.C" style:family="table-column">
      <style:table-column-properties style:column-width="11.811cm"/>
    </style:style>
    <style:style style:name="Tableau1.A1" style:family="table-cell">
      <style:table-cell-properties style:vertical-align="middle" fo:padding-left="0.132cm" fo:padding-right="0.132cm" fo:padding-top="0.053cm" fo:padding-bottom="0.053cm" fo:border="0.05pt solid #2c2f31"/>
    </style:style>
    <style:style style:name="Tableau1.3" style:family="table-row">
      <style:table-row-properties fo:background-color="#202325">
        <style:background-image/>
      </style:table-row-properties>
    </style:style>
    <style:style style:name="P1" style:family="paragraph" style:parent-style-name="Heading_20_1" style:master-page-name="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font-name="Noto Serif" fo:letter-spacing="normal" fo:font-style="normal" fo:font-weight="bold" style:font-weight-asian="bold" style:font-weight-complex="bold"/>
    </style:style>
    <style:style style:name="P2" style:family="paragraph" style:parent-style-name="Heading_20_2">
      <style:paragraph-properties fo:margin-left="0cm" fo:margin-right="0cm" fo:margin-top="0cm" fo:margin-bottom="0.499cm" style:contextual-spacing="false" fo:line-height="114%" fo:orphans="2" fo:widows="2" fo:text-indent="0cm" style:auto-text-indent="false"/>
      <style:text-properties fo:font-variant="normal" fo:text-transform="none" fo:color="#000000" loext:opacity="100%" style:font-name="Noto Serif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style:contextual-spacing="false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5" style:family="paragraph" style:parent-style-name="Text_20_body" style:list-style-name="L1">
      <style:paragraph-properties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cm" style:contextual-spacing="false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8" style:family="paragraph" style:parent-style-name="Text_20_body" style:list-style-name="L2">
      <style:paragraph-properties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9" style:family="paragraph" style:parent-style-name="Horizontal_20_Line">
      <style:paragraph-properties fo:margin-top="0cm" fo:margin-bottom="0cm" style:contextual-spacing="false" fo:line-height="114%"/>
      <style:text-properties fo:color="#000000" loext:opacity="100%" style:font-name="Google Sans"/>
    </style:style>
    <style:style style:name="P10" style:family="paragraph" style:parent-style-name="Heading_20_3">
      <style:paragraph-properties fo:margin-left="0cm" fo:margin-right="0cm" fo:margin-top="0cm" fo:margin-bottom="0.499cm" style:contextual-spacing="false" fo:line-height="114%" fo:orphans="2" fo:widows="2" fo:text-indent="0cm" style:auto-text-indent="false"/>
      <style:text-properties fo:font-variant="normal" fo:text-transform="none" fo:color="#000000" loext:opacity="100%" style:font-name="Noto Serif" fo:letter-spacing="normal" fo:font-style="normal" fo:font-weight="normal"/>
    </style:style>
    <style:style style:name="P11" style:family="paragraph" style:parent-style-name="Text_20_body">
      <style:paragraph-properties fo:margin-left="0cm" fo:margin-right="0cm" fo:line-height="114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12" style:family="paragraph" style:parent-style-name="Heading_20_3">
      <style:paragraph-properties fo:margin-left="0cm" fo:margin-right="0cm" fo:margin-top="0cm" fo:margin-bottom="0.499cm" style:contextual-spacing="false" fo:line-height="114%" fo:orphans="2" fo:widows="2" fo:text-indent="0cm" style:auto-text-indent="false"/>
      <style:text-properties style:font-name="Noto Serif" officeooo:paragraph-rsid="00212ae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cm" style:contextual-spacing="false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line-height="114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 fo:background-color="#ffffff"/>
    </style:style>
    <style:style style:name="P17" style:family="paragraph" style:parent-style-name="Heading_20_3">
      <style:paragraph-properties fo:margin-left="0cm" fo:margin-right="0cm" fo:margin-top="0cm" fo:margin-bottom="0.499cm" style:contextual-spacing="false" fo:line-height="114%" fo:orphans="2" fo:widows="2" fo:text-indent="0cm" style:auto-text-indent="false"/>
      <style:text-properties fo:font-variant="normal" fo:text-transform="none" fo:color="#000000" loext:opacity="100%" style:font-name="Noto Serif" fo:letter-spacing="normal" fo:font-style="normal" fo:font-weight="normal" fo:background-color="#ffffff"/>
    </style:style>
    <style:style style:name="P18" style:family="paragraph" style:parent-style-name="Text_20_body" style:list-style-name="L4">
      <style:paragraph-properties fo:margin-left="0cm" fo:margin-right="0cm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line-height="114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 officeooo:paragraph-rsid="00212aee"/>
    </style:style>
    <style:style style:name="P20" style:family="paragraph" style:parent-style-name="Quotations">
      <style:paragraph-properties fo:margin-left="0cm" fo:margin-right="0cm" fo:line-height="114%" fo:orphans="2" fo:widows="2" fo:text-indent="0cm" style:auto-text-indent="false"/>
      <style:text-properties fo:color="#000000" loext:opacity="100%" style:font-name="Noto Serif" officeooo:paragraph-rsid="00212aee"/>
    </style:style>
    <style:style style:name="P21" style:family="paragraph" style:parent-style-name="Text_20_body" style:list-style-name="L5">
      <style:paragraph-properties fo:margin-left="0cm" fo:margin-right="0cm" fo:line-height="200%" fo:orphans="2" fo:widows="2" fo:text-indent="0cm" style:auto-text-indent="false"/>
      <style:text-properties fo:font-variant="normal" fo:text-transform="none" fo:color="#000000" loext:opacity="100%" style:font-name="Noto Serif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499cm" style:contextual-spacing="false" fo:line-height="114%" fo:orphans="2" fo:widows="2" fo:text-indent="0cm" style:auto-text-indent="false"/>
      <style:text-properties fo:color="#000000" loext:opacity="100%" style:font-name="Google Sans"/>
    </style:style>
    <style:style style:name="P23" style:family="paragraph" style:parent-style-name="Table_20_Heading">
      <style:paragraph-properties fo:margin-left="0cm" fo:margin-right="0cm" fo:text-align="left" style:justify-single-word="false" fo:text-indent="0cm" style:auto-text-indent="false"/>
      <style:text-properties fo:font-weight="bold"/>
    </style:style>
    <style:style style:name="P24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fo:font-family="'Noto Sans Mono', monospace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SES CASES — MON ALLURE — RÔLES ET ENTITÉS</text:h>
      <text:h text:style-name="P2" text:outline-level="2">1. RÔLES</text:h>
      <text:list text:style-name="L1">
        <text:list-item>
          <text:p text:style-name="P3">Visiteur</text:p>
        </text:list-item>
        <text:list-item>
          <text:p text:style-name="P4">Utilisateur</text:p>
        </text:list-item>
        <text:list-item>
          <text:p text:style-name="P5">Administrateur</text:p>
        </text:list-item>
      </text:list>
      <text:h text:style-name="P2" text:outline-level="2">2. ENTITÉS</text:h>
      <text:list text:style-name="L2">
        <text:list-item>
          <text:p text:style-name="P6">User</text:p>
        </text:list-item>
        <text:list-item>
          <text:p text:style-name="P7">Profile</text:p>
        </text:list-item>
        <text:list-item>
          <text:p text:style-name="P7">TrainingPlan</text:p>
        </text:list-item>
        <text:list-item>
          <text:p text:style-name="P7">Session</text:p>
        </text:list-item>
        <text:list-item>
          <text:p text:style-name="P7">IntensityZone</text:p>
        </text:list-item>
        <text:list-item>
          <text:p text:style-name="P7">Performance</text:p>
        </text:list-item>
        <text:list-item>
          <text:p text:style-name="P7">Comment</text:p>
        </text:list-item>
        <text:list-item>
          <text:p text:style-name="P8">AlgorithmParameter</text:p>
        </text:list-item>
      </text:list>
      <text:p text:style-name="P9"/>
      <text:h text:style-name="P2" text:outline-level="2">EPIC 1 — PROFIL</text:h>
      <text:h text:style-name="P10" text:outline-level="3">UC-101 — Créer un compte</text:h>
      <text:p text:style-name="P11">Acteur : Visiteur Entités : User (C), Profile (C)</text:p>
      <text:h text:style-name="P10" text:outline-level="3">UC-102 — Se connecter</text:h>
      <text:p text:style-name="P11">Acteur : Utilisateur Entités : User (R)</text:p>
      <text:h text:style-name="P10" text:outline-level="3"><text:soft-page-break/>UC-103 — Modifier son profil</text:h>
      <text:p text:style-name="P11">Acteur : Utilisateur Entités : Profile (U)</text:p>
      <text:p text:style-name="P9"/>
      <text:h text:style-name="P2" text:outline-level="2">EPIC 2 — OBJECTIF &amp; PARAMÉTRAGE</text:h>
      <text:h text:style-name="P10" text:outline-level="3">UC-201 — Définir un niveau (pôle)</text:h>
      <text:p text:style-name="P11">Acteur : Utilisateur Entités : TrainingPlan (C)</text:p>
      <text:p text:style-name="P11">Le pôle (<text:span text:style-name="Source_20_Text"><text:span text:style-name="T1">pole_type</text:span></text:span>) est choisi <text:span text:style-name="Strong_20_Emphasis"><text:span text:style-name="T2">au moment de la création</text:span></text:span> du plan, pas modifiable après coup sur un plan existant.</text:p>
      <text:h text:style-name="P12" text:outline-level="3"><text:span text:style-name="T3">UC-202 — Définir un objectif de course</text:span></text:h>
      <text:p text:style-name="P11">Acteur : Utilisateur Entités : TrainingPlan (C/U)</text:p>
      <text:list text:style-name="L3">
        <text:list-item>
          <text:p text:style-name="P13">distance / temps / D+</text:p>
        </text:list-item>
        <text:list-item>
          <text:p text:style-name="P14">terrain</text:p>
        </text:list-item>
        <text:list-item>
          <text:p text:style-name="P14">unité</text:p>
        </text:list-item>
        <text:list-item>
          <text:p text:style-name="P15">faisabilité calculée automatiquement</text:p>
        </text:list-item>
      </text:list>
      <text:p text:style-name="P9"/>
      <text:h text:style-name="P2" text:outline-level="2">EPIC 3 — GÉNÉRATION &amp; CONSULTATION</text:h>
      <text:h text:style-name="P10" text:outline-level="3">UC-301 — Consulter son plan</text:h>
      <text:p text:style-name="P11">Acteur : Utilisateur Entités : TrainingPlan (R), Session (R)</text:p>
      <text:h text:style-name="P10" text:outline-level="3">UC-302 — Consulter une séance</text:h>
      <text:p text:style-name="P11">Acteur : Utilisateur Entités : Session (R), IntensityZone (R)</text:p>
      <text:p text:style-name="P16">La consultation d’une séance affiche aussi les zones d’intensité ciblées (endurance, seuil, VMA…).</text:p>
      <text:h text:style-name="P17" text:outline-level="3">UC-303 — Update plan (Recalculer son plan d’entraînement)</text:h>
      <text:p text:style-name="P11">Acteur : Utilisateur Entités : TrainingPlan (U), Performance (R), Session (U)</text:p>
      <text:h text:style-name="P10" text:outline-level="3"><text:soft-page-break/>UC-304 — Consulter les zones d’intensité</text:h>
      <text:p text:style-name="P11">Acteur : Utilisateur Entités : IntensityZone (R)</text:p>
      <text:p text:style-name="P9"/>
      <text:h text:style-name="P2" text:outline-level="2">EPIC 4 — SUIVI &amp; PERFORMANCE</text:h>
      <text:h text:style-name="P10" text:outline-level="3">UC-401 — Enregistrer une performance</text:h>
      <text:p text:style-name="P11">Acteur : Utilisateur Entités : Performance (C)</text:p>
      <text:list text:style-name="L4">
        <text:list-item>
          <text:p text:style-name="P18">peut déclencher adaptation du plan</text:p>
        </text:list-item>
      </text:list>
      <text:h text:style-name="P10" text:outline-level="3">UC-402 — Consulter statistiques</text:h>
      <text:p text:style-name="P11">Acteur : Utilisateur Entités : Performance (R), Profile (R)</text:p>
      <text:h text:style-name="P10" text:outline-level="3">UC-403 — Exporter son plan d’entraînement</text:h>
      <text:p text:style-name="P19">Acteur : Utilisateur Entités : TrainingPlan (R), Session (R)</text:p>
      <text:p text:style-name="P20"><text:span text:style-name="T4">Export uniquement du plan et de ses séances — ne concerne ni Performance ni Profile.</text:span></text:p>
      <text:p text:style-name="P19">Export uniquement du plan et de ses séances — ne concerne ni Performance ni Profile.</text:p>
      <text:p text:style-name="P9"/>
      <text:h text:style-name="P2" text:outline-level="2">EPIC 5 — OPTIMISATION AUTOMATIQUE DES PLANS</text:h>
      <text:h text:style-name="P10" text:outline-level="3">UC-501 — Adapter automatiquement le plan</text:h>
      <text:p text:style-name="P11">Acteur : Système Entités : TrainingPlan (U), Performance (R), Session (U)</text:p>
      <text:list text:style-name="L5">
        <text:list-item>
          <text:p text:style-name="P21">déclenché après UC-401</text:p>
        </text:list-item>
      </text:list>
      <text:h text:style-name="P10" text:outline-level="3">UC-502 — Appliquer règles algorithmiques</text:h>
      <text:p text:style-name="P11">Acteur : Système Entités : AlgorithmParameter (R)</text:p>
      <text:p text:style-name="P9"/>
      <text:h text:style-name="P2" text:outline-level="2"><text:soft-page-break/>EPIC 6 — COMMENTAIRES</text:h>
      <text:h text:style-name="P10" text:outline-level="3">UC-601 — Ajouter un commentaire</text:h>
      <text:p text:style-name="P11">Acteur : Utilisateur Entités : Comment (C)</text:p>
      <text:h text:style-name="P10" text:outline-level="3">UC-602 — Modérer commentaire</text:h>
      <text:p text:style-name="P11">Acteur : Administrateur Entités : Comment (U)</text:p>
      <text:p text:style-name="P9"/>
      <text:h text:style-name="P2" text:outline-level="2">EPIC 7 — ADMINISTRATION</text:h>
      <text:h text:style-name="P10" text:outline-level="3">UC-701 — Gérer utilisateurs</text:h>
      <text:p text:style-name="P11">Acteur : Administrateur Entités : User (R/U/D)</text:p>
      <text:h text:style-name="P10" text:outline-level="3">UC-702 — Modifier paramètres algorithmiques</text:h>
      <text:p text:style-name="P11">Acteur : Administrateur Entités : AlgorithmParameter (U)</text:p>
      <text:h text:style-name="P10" text:outline-level="3">UC-703 — Supervision des plans générés</text:h>
      <text:p text:style-name="P11">Acteur : Administrateur Entités : TrainingPlan (R), Session (R)</text:p>
      <text:h text:style-name="P10" text:outline-level="3">UC-704 — Supprimer commentaire</text:h>
      <text:p text:style-name="P11">Acteur : Administrateur Entités : Comment (D)</text:p>
      <text:p text:style-name="P9"/>
      <text:h text:style-name="P2" text:outline-level="2">3. MATRICE CRUD COMPLÈTE</text:h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23">Acteur</text:p>
            </table:table-cell>
            <table:table-cell table:style-name="Tableau1.A1" office:value-type="string">
              <text:p text:style-name="P23">UC</text:p>
            </table:table-cell>
            <table:table-cell table:style-name="Tableau1.A1" office:value-type="string">
              <text:p text:style-name="P23">Entités</text:p>
            </table:table-cell>
          </table:table-row>
        </table:table-header-rows>
        <table:table-row>
          <table:table-cell table:style-name="Tableau1.A1" office:value-type="string">
            <text:p text:style-name="P24">Visiteur</text:p>
          </table:table-cell>
          <table:table-cell table:style-name="Tableau1.A1" office:value-type="string">
            <text:p text:style-name="P24">UC-101</text:p>
          </table:table-cell>
          <table:table-cell table:style-name="Tableau1.A1" office:value-type="string">
            <text:p text:style-name="P24">User (C), Profile (C)</text:p>
          </table:table-cell>
        </table:table-row>
        <table:table-row table:style-name="Tableau1.3"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102</text:p>
          </table:table-cell>
          <table:table-cell table:style-name="Tableau1.A1" office:value-type="string">
            <text:p text:style-name="P24">User (R)</text:p>
          </table:table-cell>
        </table:table-row>
        <table:table-row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103</text:p>
          </table:table-cell>
          <table:table-cell table:style-name="Tableau1.A1" office:value-type="string">
            <text:p text:style-name="P24">Profile (U)</text:p>
          </table:table-cell>
        </table:table-row>
        <table:table-row table:style-name="Tableau1.3"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201</text:p>
          </table:table-cell>
          <table:table-cell table:style-name="Tableau1.A1" office:value-type="string">
            <text:p text:style-name="P24">TrainingPlan (C)</text:p>
          </table:table-cell>
        </table:table-row>
        <table:table-row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202</text:p>
          </table:table-cell>
          <table:table-cell table:style-name="Tableau1.A1" office:value-type="string">
            <text:p text:style-name="P24">TrainingPlan (C/U)</text:p>
          </table:table-cell>
        </table:table-row>
        <table:table-row table:style-name="Tableau1.3"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301</text:p>
          </table:table-cell>
          <table:table-cell table:style-name="Tableau1.A1" office:value-type="string">
            <text:p text:style-name="P24">TrainingPlan (R), Session (R)</text:p>
          </table:table-cell>
        </table:table-row>
        <table:table-row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302</text:p>
          </table:table-cell>
          <table:table-cell table:style-name="Tableau1.A1" office:value-type="string">
            <text:p text:style-name="P24">Session (R), IntensityZone (R)</text:p>
          </table:table-cell>
        </table:table-row>
        <table:table-row table:style-name="Tableau1.3"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303</text:p>
          </table:table-cell>
          <table:table-cell table:style-name="Tableau1.A1" office:value-type="string">
            <text:p text:style-name="P24">TrainingPlan (U), Performance (R), Session (U)</text:p>
          </table:table-cell>
        </table:table-row>
        <table:table-row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304</text:p>
          </table:table-cell>
          <table:table-cell table:style-name="Tableau1.A1" office:value-type="string">
            <text:p text:style-name="P24">IntensityZone (R)</text:p>
          </table:table-cell>
        </table:table-row>
        <text:soft-page-break/>
        <table:table-row table:style-name="Tableau1.3"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401</text:p>
          </table:table-cell>
          <table:table-cell table:style-name="Tableau1.A1" office:value-type="string">
            <text:p text:style-name="P24">Performance (C)</text:p>
          </table:table-cell>
        </table:table-row>
        <table:table-row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402</text:p>
          </table:table-cell>
          <table:table-cell table:style-name="Tableau1.A1" office:value-type="string">
            <text:p text:style-name="P24">Performance (R), Profile (R)</text:p>
          </table:table-cell>
        </table:table-row>
        <table:table-row table:style-name="Tableau1.3"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403</text:p>
          </table:table-cell>
          <table:table-cell table:style-name="Tableau1.A1" office:value-type="string">
            <text:p text:style-name="P24">TrainingPlan (R), Session (R)</text:p>
          </table:table-cell>
        </table:table-row>
        <table:table-row>
          <table:table-cell table:style-name="Tableau1.A1" office:value-type="string">
            <text:p text:style-name="P24">Système</text:p>
          </table:table-cell>
          <table:table-cell table:style-name="Tableau1.A1" office:value-type="string">
            <text:p text:style-name="P24">UC-501</text:p>
          </table:table-cell>
          <table:table-cell table:style-name="Tableau1.A1" office:value-type="string">
            <text:p text:style-name="P24">TrainingPlan (U), Performance (R), Session (U)</text:p>
          </table:table-cell>
        </table:table-row>
        <table:table-row table:style-name="Tableau1.3">
          <table:table-cell table:style-name="Tableau1.A1" office:value-type="string">
            <text:p text:style-name="P24">Système</text:p>
          </table:table-cell>
          <table:table-cell table:style-name="Tableau1.A1" office:value-type="string">
            <text:p text:style-name="P24">UC-502</text:p>
          </table:table-cell>
          <table:table-cell table:style-name="Tableau1.A1" office:value-type="string">
            <text:p text:style-name="P24">AlgorithmParameter (R)</text:p>
          </table:table-cell>
        </table:table-row>
        <table:table-row>
          <table:table-cell table:style-name="Tableau1.A1" office:value-type="string">
            <text:p text:style-name="P24">Utilisateur</text:p>
          </table:table-cell>
          <table:table-cell table:style-name="Tableau1.A1" office:value-type="string">
            <text:p text:style-name="P24">UC-601</text:p>
          </table:table-cell>
          <table:table-cell table:style-name="Tableau1.A1" office:value-type="string">
            <text:p text:style-name="P24">Comment (C)</text:p>
          </table:table-cell>
        </table:table-row>
        <table:table-row table:style-name="Tableau1.3">
          <table:table-cell table:style-name="Tableau1.A1" office:value-type="string">
            <text:p text:style-name="P24">Administrateur</text:p>
          </table:table-cell>
          <table:table-cell table:style-name="Tableau1.A1" office:value-type="string">
            <text:p text:style-name="P24">UC-602</text:p>
          </table:table-cell>
          <table:table-cell table:style-name="Tableau1.A1" office:value-type="string">
            <text:p text:style-name="P24">Comment (U)</text:p>
          </table:table-cell>
        </table:table-row>
        <table:table-row>
          <table:table-cell table:style-name="Tableau1.A1" office:value-type="string">
            <text:p text:style-name="P24">Administrateur</text:p>
          </table:table-cell>
          <table:table-cell table:style-name="Tableau1.A1" office:value-type="string">
            <text:p text:style-name="P24">UC-701</text:p>
          </table:table-cell>
          <table:table-cell table:style-name="Tableau1.A1" office:value-type="string">
            <text:p text:style-name="P24">User (R/U/D)</text:p>
          </table:table-cell>
        </table:table-row>
        <table:table-row table:style-name="Tableau1.3">
          <table:table-cell table:style-name="Tableau1.A1" office:value-type="string">
            <text:p text:style-name="P24">Administrateur</text:p>
          </table:table-cell>
          <table:table-cell table:style-name="Tableau1.A1" office:value-type="string">
            <text:p text:style-name="P24">UC-702</text:p>
          </table:table-cell>
          <table:table-cell table:style-name="Tableau1.A1" office:value-type="string">
            <text:p text:style-name="P24">AlgorithmParameter (U)</text:p>
          </table:table-cell>
        </table:table-row>
        <table:table-row>
          <table:table-cell table:style-name="Tableau1.A1" office:value-type="string">
            <text:p text:style-name="P24">Administrateur</text:p>
          </table:table-cell>
          <table:table-cell table:style-name="Tableau1.A1" office:value-type="string">
            <text:p text:style-name="P24">UC-703</text:p>
          </table:table-cell>
          <table:table-cell table:style-name="Tableau1.A1" office:value-type="string">
            <text:p text:style-name="P24">TrainingPlan (R), Session (R)</text:p>
          </table:table-cell>
        </table:table-row>
        <table:table-row table:style-name="Tableau1.3">
          <table:table-cell table:style-name="Tableau1.A1" office:value-type="string">
            <text:p text:style-name="P24">Administrateur</text:p>
          </table:table-cell>
          <table:table-cell table:style-name="Tableau1.A1" office:value-type="string">
            <text:p text:style-name="P24">UC-704</text:p>
          </table:table-cell>
          <table:table-cell table:style-name="Tableau1.A1" office:value-type="string">
            <text:p text:style-name="Table_20_Contents">Comment (D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, ui-serif, 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15:21:16.418484813</meta:creation-date>
    <dc:date>2026-07-07T11:35:30.869432952</dc:date>
    <meta:editing-duration>P1DT1H43M10S</meta:editing-duration>
    <meta:editing-cycles>8</meta:editing-cycles>
    <meta:generator>LibreOffice/26.2.4.2$Linux_X86_64 LibreOffice_project/3346a99e6b841765b75a9b29714a5b95c6761ce3</meta:generator>
    <meta:document-statistic meta:table-count="1" meta:image-count="0" meta:object-count="0" meta:page-count="5" meta:paragraph-count="135" meta:word-count="500" meta:character-count="3440" meta:non-whitespace-character-count="3061"/>
  </office:meta>
</office:document-meta>
</file>